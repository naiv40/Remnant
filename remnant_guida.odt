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ella1" style:family="table">
      <style:table-properties style:width="16.51cm" fo:margin-left="-0.191cm" fo:margin-top="0cm" fo:margin-bottom="0cm" table:align="left"/>
    </style:style>
    <style:style style:name="Tabella1.A" style:family="table-column">
      <style:table-column-properties style:column-width="6.348cm"/>
    </style:style>
    <style:style style:name="Tabella1.B" style:family="table-column">
      <style:table-column-properties style:column-width="10.16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fo:padding-left="0.191cm" fo:padding-right="0.191cm" fo:padding-top="0cm" fo:padding-bottom="0cm" fo:border="0.004cm solid #dddddd"/>
    </style:style>
    <style:style style:name="Tabella2" style:family="table">
      <style:table-properties style:width="16.51cm" fo:margin-left="-0.191cm" fo:margin-top="0cm" fo:margin-bottom="0cm" table:align="left"/>
    </style:style>
    <style:style style:name="Tabella2.A" style:family="table-column">
      <style:table-column-properties style:column-width="6.348cm"/>
    </style:style>
    <style:style style:name="Tabella2.B" style:family="table-column">
      <style:table-column-properties style:column-width="10.16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fo:padding-left="0.191cm" fo:padding-right="0.191cm" fo:padding-top="0cm" fo:padding-bottom="0cm" fo:border="0.004cm solid #dddddd"/>
    </style:style>
    <style:style style:name="Tabella3" style:family="table">
      <style:table-properties style:width="16.51cm" fo:margin-left="-0.191cm" fo:margin-top="0cm" fo:margin-bottom="0cm" table:align="left"/>
    </style:style>
    <style:style style:name="Tabella3.A" style:family="table-column">
      <style:table-column-properties style:column-width="5.643cm"/>
    </style:style>
    <style:style style:name="Tabella3.B" style:family="table-column">
      <style:table-column-properties style:column-width="10.866cm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fo:padding-left="0.191cm" fo:padding-right="0.191cm" fo:padding-top="0cm" fo:padding-bottom="0cm" fo:border="0.004cm solid #dddddd"/>
    </style:style>
    <style:style style:name="Tabella4" style:family="table">
      <style:table-properties style:width="16.51cm" fo:margin-left="-0.191cm" fo:margin-top="0cm" fo:margin-bottom="0cm" table:align="left"/>
    </style:style>
    <style:style style:name="Tabella4.A" style:family="table-column">
      <style:table-column-properties style:column-width="6.348cm"/>
    </style:style>
    <style:style style:name="Tabella4.B" style:family="table-column">
      <style:table-column-properties style:column-width="10.16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fo:padding-left="0.191cm" fo:padding-right="0.191cm" fo:padding-top="0cm" fo:padding-bottom="0cm" fo:border="0.004cm solid #dddddd"/>
    </style:style>
    <style:style style:name="Tabella5" style:family="table">
      <style:table-properties style:width="16.51cm" fo:margin-left="-0.191cm" fo:margin-top="0cm" fo:margin-bottom="0cm" table:align="left"/>
    </style:style>
    <style:style style:name="Tabella5.A" style:family="table-column">
      <style:table-column-properties style:column-width="6.348cm"/>
    </style:style>
    <style:style style:name="Tabella5.B" style:family="table-column">
      <style:table-column-properties style:column-width="10.16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fo:padding-left="0.191cm" fo:padding-right="0.191cm" fo:padding-top="0cm" fo:padding-bottom="0cm" fo:border="0.004cm solid #dddddd"/>
    </style:style>
    <style:style style:name="Tabella6" style:family="table">
      <style:table-properties style:width="16.51cm" fo:margin-left="-0.191cm" fo:margin-top="0cm" fo:margin-bottom="0cm" table:align="left"/>
    </style:style>
    <style:style style:name="Tabella6.A" style:family="table-column">
      <style:table-column-properties style:column-width="6.348cm"/>
    </style:style>
    <style:style style:name="Tabella6.B" style:family="table-column">
      <style:table-column-properties style:column-width="10.16cm"/>
    </style:style>
    <style:style style:name="Tabella6.1" style:family="table-row">
      <style:table-row-properties style:keep-together="true" fo:keep-together="auto"/>
    </style:style>
    <style:style style:name="Tabella6.A1" style:family="table-cell">
      <style:table-cell-properties fo:padding-left="0.191cm" fo:padding-right="0.191cm" fo:padding-top="0cm" fo:padding-bottom="0cm" fo:border="0.004cm solid #dddddd"/>
    </style:style>
    <style:style style:name="Tabella7" style:family="table">
      <style:table-properties style:width="16.51cm" fo:margin-left="-0.191cm" fo:margin-top="0cm" fo:margin-bottom="0cm" table:align="left"/>
    </style:style>
    <style:style style:name="Tabella7.A" style:family="table-column">
      <style:table-column-properties style:column-width="6.348cm"/>
    </style:style>
    <style:style style:name="Tabella7.B" style:family="table-column">
      <style:table-column-properties style:column-width="10.16cm"/>
    </style:style>
    <style:style style:name="Tabella7.1" style:family="table-row">
      <style:table-row-properties style:keep-together="true" fo:keep-together="auto"/>
    </style:style>
    <style:style style:name="Tabella7.A1" style:family="table-cell">
      <style:table-cell-properties fo:padding-left="0.191cm" fo:padding-right="0.191cm" fo:padding-top="0cm" fo:padding-bottom="0cm" fo:border="0.004cm solid #dddddd"/>
    </style:style>
    <style:style style:name="P1" style:family="paragraph" style:parent-style-name="Heading_20_2">
      <style:paragraph-properties fo:margin-top="0.529cm" fo:margin-bottom="0.212cm"/>
    </style:style>
    <style:style style:name="P2" style:family="paragraph" style:parent-style-name="Heading_20_1">
      <style:paragraph-properties fo:margin-top="0.706cm" fo:margin-bottom="0.282cm"/>
    </style:style>
    <style:style style:name="P3" style:family="paragraph" style:parent-style-name="Heading_20_1" style:master-page-name="Converted1">
      <style:paragraph-properties fo:margin-top="0.706cm" fo:margin-bottom="0.282cm" style:page-number="auto"/>
    </style:style>
    <style:style style:name="P4" style:family="paragraph" style:parent-style-name="List_20_Paragraph" style:list-style-name="WWNum2">
      <style:paragraph-properties fo:margin-top="0.071cm" fo:margin-bottom="0.141cm"/>
    </style:style>
    <style:style style:name="P5" style:family="paragraph" style:parent-style-name="Standard" style:master-page-name="Standard">
      <style:paragraph-properties fo:margin-top="4.233cm" fo:margin-bottom="4.233cm" style:page-number="auto"/>
    </style:style>
    <style:style style:name="P6" style:family="paragraph" style:parent-style-name="Standard">
      <style:paragraph-properties fo:margin-top="0cm" fo:margin-bottom="0.176cm" fo:text-align="center" style:justify-single-word="false"/>
    </style:style>
    <style:style style:name="P7" style:family="paragraph" style:parent-style-name="Standard">
      <style:paragraph-properties fo:margin-top="0cm" fo:margin-bottom="0.176cm" fo:padding="0cm" fo:border-left="none" fo:border-right="none" fo:border-top="none" fo:border-bottom="0.018cm solid #dddddd"/>
    </style:style>
    <style:style style:name="P8" style:family="paragraph" style:parent-style-name="Standard">
      <style:paragraph-properties fo:margin-top="0cm" fo:margin-bottom="0.106cm" fo:text-align="center" style:justify-single-word="false"/>
    </style:style>
    <style:style style:name="P9" style:family="paragraph" style:parent-style-name="Standard">
      <style:paragraph-properties fo:margin-top="0cm" fo:margin-bottom="0.529cm" fo:text-align="center" style:justify-single-word="false"/>
    </style:style>
    <style:style style:name="P10" style:family="paragraph" style:parent-style-name="Standard">
      <style:paragraph-properties fo:margin-top="0.353cm" fo:margin-bottom="0.353cm" fo:padding="0cm" fo:border-left="none" fo:border-right="none" fo:border-top="none" fo:border-bottom="0.018cm solid #cccccc"/>
    </style:style>
    <style:style style:name="P11" style:family="paragraph" style:parent-style-name="Standard">
      <style:paragraph-properties fo:margin-top="0.353cm" fo:margin-bottom="0.353cm"/>
    </style:style>
    <style:style style:name="P12" style:family="paragraph" style:parent-style-name="Standard">
      <style:paragraph-properties fo:margin-top="0.706cm" fo:margin-bottom="0.706cm"/>
    </style:style>
    <style:style style:name="P13" style:family="paragraph" style:parent-style-name="Standard">
      <style:paragraph-properties fo:margin-top="0.071cm" fo:margin-bottom="0.071cm" fo:text-align="center" style:justify-single-word="false"/>
    </style:style>
    <style:style style:name="P14" style:family="paragraph" style:parent-style-name="Standard">
      <style:paragraph-properties fo:margin-top="0.106cm" fo:margin-bottom="0.212cm"/>
    </style:style>
    <style:style style:name="P15" style:family="paragraph" style:parent-style-name="Standard">
      <style:paragraph-properties fo:margin-top="0.212cm" fo:margin-bottom="0.212cm"/>
    </style:style>
    <style:style style:name="P16" style:family="paragraph" style:parent-style-name="Standard">
      <style:paragraph-properties fo:margin-left="0.847cm" fo:margin-right="0cm" fo:margin-top="0.106cm" fo:margin-bottom="0.141cm" fo:text-indent="0cm" style:auto-text-indent="false" fo:padding-left="0.282cm" fo:padding-right="0cm" fo:padding-top="0cm" fo:padding-bottom="0cm" fo:border-left="0.053cm solid #2e7d99" fo:border-right="none" fo:border-top="none" fo:border-bottom="none"/>
    </style:style>
    <style:style style:name="P17" style:family="paragraph" style:parent-style-name="Standard">
      <style:paragraph-properties fo:margin-left="0.847cm" fo:margin-right="0.847cm" fo:margin-top="0cm" fo:margin-bottom="0cm" fo:text-indent="0cm" style:auto-text-indent="false" fo:background-color="#f0f4f8">
        <style:background-image/>
      </style:paragraph-properties>
    </style:style>
    <style:style style:name="P18" style:family="paragraph" style:parent-style-name="Standard">
      <style:paragraph-properties fo:margin-left="1.27cm" fo:margin-right="0cm" fo:margin-top="0.071cm" fo:margin-bottom="0.141cm" fo:text-indent="0cm" style:auto-text-indent="false"/>
    </style:style>
    <style:style style:name="P19" style:family="paragraph" style:parent-style-name="Standard">
      <style:paragraph-properties fo:margin-left="1.27cm" fo:margin-right="0cm" fo:margin-top="0.106cm" fo:margin-bottom="0.212cm" fo:text-indent="0cm" style:auto-text-indent="false"/>
    </style:style>
    <style:style style:name="P20" style:family="paragraph" style:parent-style-name="Standard">
      <style:paragraph-properties fo:margin-top="0.141cm" fo:margin-bottom="0.141cm"/>
    </style:style>
    <style:style style:name="P21" style:family="paragraph" style:parent-style-name="Standard">
      <style:paragraph-properties fo:margin-top="0.353cm" fo:margin-bottom="0cm" fo:text-align="center" style:justify-single-word="false"/>
    </style:style>
    <style:style style:name="P22" style:family="paragraph" style:parent-style-name="Standard">
      <style:paragraph-properties fo:margin-top="0.141cm" fo:margin-bottom="0cm" fo:padding="0cm" fo:border-left="none" fo:border-right="none" fo:border-top="0.018cm solid #dddddd" fo:border-bottom="none"/>
    </style:style>
    <style:style style:name="T1" style:family="text">
      <style:text-properties fo:color="#1f3b6b" style:font-name="Georgia" fo:font-size="32pt" fo:font-weight="normal" style:font-name-asian="Georgia1" style:font-size-asian="32pt" style:font-weight-asian="normal" style:font-name-complex="Georgia1" style:font-size-complex="32pt" style:font-weight-complex="normal"/>
    </style:style>
    <style:style style:name="T2" style:family="text">
      <style:text-properties fo:color="#1f3b6b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3" style:family="text">
      <style:text-properties fo:color="#1f3b6b" style:font-name="Courier New" fo:font-size="9.5pt" fo:font-weight="bold" style:font-name-asian="Courier New1" style:font-size-asian="9.5pt" style:font-weight-asian="bold" style:font-name-complex="Courier New1" style:font-size-complex="9.5pt" style:font-weight-complex="bold"/>
    </style:style>
    <style:style style:name="T4" style:family="text">
      <style:text-properties fo:color="#1f3b6b" style:font-name="Courier New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5" style:family="text">
      <style:text-properties fo:color="#444444" style:font-name="Arial" fo:font-size="12pt" fo:font-style="italic" style:font-name-asian="Arial2" style:font-size-asian="12pt" style:font-style-asian="italic" style:font-name-complex="Arial2" style:font-size-complex="12pt" style:font-style-complex="italic"/>
    </style:style>
    <style:style style:name="T6" style:family="text">
      <style:text-properties fo:color="#444444" style:font-name="Arial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T7" style:family="text">
      <style:text-properties fo:color="#444444" style:font-name="Arial" fo:font-size="10.5pt" style:font-name-asian="Arial2" style:font-size-asian="10.5pt" style:font-name-complex="Arial2" style:font-size-complex="10.5pt"/>
    </style:style>
    <style:style style:name="T8" style:family="text">
      <style:text-properties fo:color="#888888" style:font-name="Arial" fo:font-size="10pt" style:font-name-asian="Arial2" style:font-size-asian="10pt" style:font-name-complex="Arial2" style:font-size-complex="10pt"/>
    </style:style>
    <style:style style:name="T9" style:family="text">
      <style:text-properties fo:color="#888888" style:font-name="Arial" fo:font-size="8pt" style:font-name-asian="Arial2" style:font-size-asian="8pt" style:font-name-complex="Arial2" style:font-size-complex="8pt"/>
    </style:style>
    <style:style style:name="T10" style:family="text">
      <style:text-properties fo:color="#888888" style:font-name="Georgia" fo:font-size="9pt" fo:font-style="italic" style:font-name-asian="Georgia1" style:font-size-asian="9pt" style:font-style-asian="italic" style:font-name-complex="Georgia1" style:font-size-complex="9pt" style:font-style-complex="italic"/>
    </style:style>
    <style:style style:name="T11" style:family="text">
      <style:text-properties fo:color="#111111" style:font-name="Arial" fo:font-size="11pt" style:font-name-asian="Arial2" style:font-size-asian="11pt" style:font-name-complex="Arial2" style:font-size-complex="11pt"/>
    </style:style>
    <style:style style:name="T12" style:family="text">
      <style:text-properties fo:color="#111111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3" style:family="text">
      <style:text-properties fo:color="#111111" style:font-name="Arial" fo:font-size="10pt" style:font-name-asian="Arial2" style:font-size-asian="10pt" style:font-name-complex="Arial2" style:font-size-complex="10pt"/>
    </style:style>
    <style:style style:name="T14" style:family="text">
      <style:text-properties fo:color="#111111" style:font-name="Arial" fo:font-size="10.5pt" style:font-name-asian="Arial2" style:font-size-asian="10.5pt" style:font-name-complex="Arial2" style:font-size-complex="10.5pt"/>
    </style:style>
    <style:style style:name="T15" style:family="text">
      <style:text-properties fo:color="#111111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6" style:family="text">
      <style:text-properties fo:color="#2e7d99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7" style:family="text">
      <style:text-properties fo:color="#2c2c2c" style:font-name="Courier New" fo:font-size="9pt" style:font-name-asian="Courier New1" style:font-size-asian="9pt" style:font-name-complex="Courier New1" style:font-size-complex="9pt"/>
    </style:style>
    <style:style style:name="T18" style:family="text">
      <style:text-properties fo:color="#8b2fc9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9" style:family="text">
      <style:text-properties fo:color="#8b2fc9" style:font-name="Courier New" fo:font-size="9.5pt" style:font-name-asian="Courier New1" style:font-size-asian="9.5pt" style:font-name-complex="Courier New1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<text:span text:style-name="T1">REMNANT</text:span></text:p>
      <text:p text:style-name="P8"><text:span text:style-name="T5">ConTimbre <text:s/>· <text:s/>Live System</text:span></text:p>
      <text:p text:style-name="P9"><text:span text:style-name="T8">Guida di sistema — versione 3</text:span></text:p>
      <text:p text:style-name="P10"/>
      <text:p text:style-name="P12"/>
      <text:p text:style-name="P13"><text:span text:style-name="T6">Sistema integrato Dash · SuperCollider · FluCoMa · OSC · UMAP · ConTimbre ePlayer</text:span></text:p>
      <text:h text:style-name="P3" text:outline-level="1"><text:span text:style-name="T2">1. <text:s/>Architettura del sistema</text:span></text:h>
      <text:p text:style-name="P14"><text:span text:style-name="T11">Remnant è un sistema per composizione algoritmica e diffusione live di timbri orchestrali. È composto da tre strati indipendenti che comunicano via OSC e file JSON.</text:span></text:p>
      <text:p text:style-name="P15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Standard"><text:span text:style-name="T3">Remnant (Dash)</text:span></text:p>
          </table:table-cell>
          <table:table-cell table:style-name="Tabella1.A1" office:value-type="string">
            <text:p text:style-name="Standard"><text:span text:style-name="T13">Interfaccia di regia. Genera composizioni, visualizza UMAP, gestisce la timeline dei gesti e invia comandi OSC a SuperCollider.</text:span></text:p>
          </table:table-cell>
        </table:table-row>
        <table:table-row table:style-name="Tabella1.1">
          <table:table-cell table:style-name="Tabella1.A1" office:value-type="string">
            <text:p text:style-name="Standard"><text:span text:style-name="T3">SuperCollider</text:span></text:p>
          </table:table-cell>
          <table:table-cell table:style-name="Tabella1.A1" office:value-type="string">
            <text:p text:style-name="Standard"><text:span text:style-name="T13">Motore sonoro. Mantiene 16 synth permanenti (uno per strumento), riceve trigger OSC, applica elaborazione Lachenmann, gestisce la spazializzazione ottofonca.</text:span></text:p>
          </table:table-cell>
        </table:table-row>
        <table:table-row table:style-name="Tabella1.1">
          <table:table-cell table:style-name="Tabella1.A1" office:value-type="string">
            <text:p text:style-name="Standard"><text:span text:style-name="T3">FluCoMa</text:span></text:p>
          </table:table-cell>
          <table:table-cell table:style-name="Tabella1.A1" office:value-type="string">
            <text:p text:style-name="Standard"><text:span text:style-name="T13">Analisi in tempo reale. Analizza il mix mono dell'orchestra con FluidLoudness e FluidSpectralShape, modula automaticamente la tensione (contributo max 0.4).</text:span></text:p>
          </table:table-cell>
        </table:table-row>
      </table:table>
      <text:p text:style-name="P11"/>
      <text:h text:style-name="P1" text:outline-level="2"><text:span text:style-name="T16">1.1 <text:s/>Flusso dei dati</text:span></text:h>
      <text:p text:style-name="P17"><text:span text:style-name="T17">ConTimbre TSV</text:span></text:p>
      <text:p text:style-name="P17"><text:span text:style-name="T17"><text:s text:c="4"/>↓ <text:s/>export_tsv.lisp (SBCL)</text:span></text:p>
      <text:p text:style-name="P17"><text:span text:style-name="T17">contimbre_full.tsv</text:span></text:p>
      <text:p text:style-name="P17"><text:span text:style-name="T17"><text:s text:c="4"/>↓ <text:s/>umap_full.py <text:s/>(McAdams weights)</text:span></text:p>
      <text:p text:style-name="P17"><text:span text:style-name="T17">umap_full_coords.csv</text:span></text:p>
      <text:p text:style-name="P17"><text:span text:style-name="T17"><text:s text:c="4"/>↓ <text:s/>contimbre_explorer.py <text:s/>(Dash)</text:span></text:p>
      <text:p text:style-name="P17"><text:span text:style-name="T17"><text:s text:c="8"/>├─ Filtro strumenti + UMAP locale</text:span></text:p>
      <text:p text:style-name="P17"><text:span text:style-name="T17"><text:s text:c="8"/>├─ Percorso browniano multi-gesto</text:span></text:p>
      <text:p text:style-name="P17"><text:span text:style-name="T17"><text:s text:c="8"/>├─ Partitura grafica interattiva</text:span></text:p>
      <text:p text:style-name="P17"><text:span text:style-name="T17"><text:s text:c="8"/>├─ Export .cOrc / .cePlayerOrc (SBCL)</text:span></text:p>
      <text:p text:style-name="P17"><text:span text:style-name="T17"><text:s text:c="8"/>└─ OSC → SuperCollider</text:span></text:p>
      <text:p text:style-name="P17"><text:span text:style-name="T17"><text:s text:c="16"/>├─ remnant_sc.scd <text:s/>(16 synth)</text:span></text:p>
      <text:p text:style-name="P17"><text:span text:style-name="T17"><text:s text:c="16"/>└─ remnant_flucos.scd <text:s/>(FluCoMa)</text:span></text:p>
      <text:p text:style-name="P11"/>
      <text:p text:style-name="P10"/>
      <text:h text:style-name="P2" text:outline-level="1"><text:span text:style-name="T2">2. <text:s/>Installazione e dipendenze</text:span></text:h>
      <text:h text:style-name="P1" text:outline-level="2"><text:span text:style-name="T16">2.1 <text:s/>Python</text:span></text:h>
      <text:p text:style-name="P14"><text:span text:style-name="T11">Crea un ambiente virtuale (consigliato) e installa:</text:span></text:p>
      <text:p text:style-name="P17"><text:span text:style-name="T17">pip install dash plotly pandas numpy scikit-learn umap-learn flask</text:span></text:p>
      <text:p text:style-name="P14"><text:span text:style-name="T11">Il file principale è </text:span><text:span text:style-name="T18">contimbre_explorer.py</text:span><text:span text:style-name="T11">. Percorsi predefiniti:</text:span></text:p>
      <text:p text:style-name="P18"><text:span text:style-name="T4">UMAP_FULL_PATH <text:s/></text:span><text:span text:style-name="T7">scores/umap_full_coords.csv <text:s/>(relativo allo script)</text:span></text:p>
      <text:p text:style-name="P18"><text:span text:style-name="T4">UMAP_ORIG_PATH <text:s/></text:span><text:span text:style-name="T7">/tmp/contimbre_full.tsv</text:span></text:p>
      <text:p text:style-name="P18"><text:span text:style-name="T4">SCORE_DIR <text:s/></text:span><text:span text:style-name="T7">scores/ <text:s/>(creata automaticamente)</text:span></text:p>
      <text:h text:style-name="P1" text:outline-level="2"><text:span text:style-name="T16">2.2 <text:s/>SuperCollider</text:span></text:h>
      <text:p text:style-name="P14"><text:span text:style-name="T11">Richiede SuperCollider ≥ 3.12 con Quark </text:span><text:span text:style-name="T12">FluCoMa</text:span><text:span text:style-name="T11"> installato:</text:span></text:p>
      <text:p text:style-name="P17"><text:span text:style-name="T17">Quarks.install("FluCoMa");</text:span></text:p>
      <text:p text:style-name="P17"><text:span text:style-name="T17">// Riavvia SC dopo l'installazione</text:span></text:p>
      <text:p text:style-name="P14"><text:span text:style-name="T11">File SC necessari nella stessa cartella:</text:span></text:p>
      <text:list xml:id="list6687887385080795059" text:style-name="WWNum2">
        <text:list-item>
          <text:p text:style-name="P4"><text:soft-page-break/><text:span text:style-name="T19">remnant_sc.scd</text:span><text:span text:style-name="T14"> <text:s/>— synth permanenti, routing OSC, spazializzazione</text:span></text:p>
        </text:list-item>
        <text:list-item>
          <text:p text:style-name="P4"><text:span text:style-name="T19">remnant_flucos.scd</text:span><text:span text:style-name="T14"> <text:s/>— analisi FluCoMa in tempo reale</text:span></text:p>
        </text:list-item>
      </text:list>
      <text:h text:style-name="P1" text:outline-level="2"><text:span text:style-name="T16">2.3 <text:s/>ConTimbre (SBCL)</text:span></text:h>
      <text:p text:style-name="P14"><text:span text:style-name="T11">SBCL e Quicklisp devono essere installati e nel PATH. Il corpus viene estratto con:</text:span></text:p>
      <text:p text:style-name="P17"><text:span text:style-name="T17">sbcl --load export_tsv.lisp</text:span></text:p>
      <text:p text:style-name="P14"><text:span text:style-name="T11">che scrive </text:span><text:span text:style-name="T18">/tmp/contimbre_full.tsv</text:span><text:span text:style-name="T11">. Esegui poi </text:span><text:span text:style-name="T18">umap_full.py</text:span><text:span text:style-name="T11"> per ricalcolare le coordinate UMAP.</text:span></text:p>
      <text:p text:style-name="P11"/>
      <text:p text:style-name="P10"/>
      <text:h text:style-name="P2" text:outline-level="1"><text:span text:style-name="T2">3. <text:s/>SuperCollider — architettura live</text:span></text:h>
      <text:h text:style-name="P1" text:outline-level="2"><text:span text:style-name="T16">3.1 <text:s/>Boot e synth permanenti</text:span></text:h>
      <text:p text:style-name="P14"><text:span text:style-name="T11">All'avvio di </text:span><text:span text:style-name="T18">remnant_sc.scd</text:span><text:span text:style-name="T11">, SC istanzia </text:span><text:span text:style-name="T12">16 SynthDef permanenti</text:span><text:span text:style-name="T11"> (uno per strumento attivo nel corpus filtrato). I synth partono tutti in stato </text:span><text:span text:style-name="T18">Neutro</text:span><text:span text:style-name="T11"> e non vengono mai distrutti durante il concerto.</text:span></text:p>
      <text:p text:style-name="P16"><text:span text:style-name="T6">L'approccio è fondamentalmente diverso dalla versione precedente: non si creano né distruggono synth durante il live. La sostituzione del suono avviene cambiando i parametri, non riallocando nodi.</text:span></text:p>
      <text:h text:style-name="P1" text:outline-level="2"><text:span text:style-name="T16">3.2 <text:s/>SynthDef Lachenmann</text:span></text:h>
      <text:p text:style-name="P14"><text:span text:style-name="T11">Tutti e sette i SynthDef sono stati riscritti secondo la grammatica sonora di Lachenmann, con la </text:span><text:span text:style-name="T12">tensione</text:span><text:span text:style-name="T11"> come parametro narrativo principale (range 0.0 → 1.0):</text:span></text:p>
      <text:p text:style-name="P20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Standard"><text:span text:style-name="T3">Neutro</text:span></text:p>
          </table:table-cell>
          <table:table-cell table:style-name="Tabella2.A1" office:value-type="string">
            <text:p text:style-name="Standard"><text:span text:style-name="T13">Playback diretto, nessuna elaborazione. Gain = 1.0.</text:span></text:p>
          </table:table-cell>
        </table:table-row>
        <table:table-row table:style-name="Tabella2.1">
          <table:table-cell table:style-name="Tabella2.A1" office:value-type="string">
            <text:p text:style-name="Standard"><text:span text:style-name="T3">Klang</text:span></text:p>
          </table:table-cell>
          <table:table-cell table:style-name="Tabella2.A1" office:value-type="string">
            <text:p text:style-name="Standard"><text:span text:style-name="T13">Riverbero spazioso (GVerb roomsize ridotto per CPU). Tensione modula revtime e wet.</text:span></text:p>
          </table:table-cell>
        </table:table-row>
        <table:table-row table:style-name="Tabella2.1">
          <table:table-cell table:style-name="Tabella2.A1" office:value-type="string">
            <text:p text:style-name="Standard"><text:span text:style-name="T3">Farbklang</text:span></text:p>
          </table:table-cell>
          <table:table-cell table:style-name="Tabella2.A1" office:value-type="string">
            <text:p text:style-name="Standard"><text:span text:style-name="T13">Ring modulation + lieve pitch shift. Tensione modula frequenza modulante e depth.</text:span></text:p>
          </table:table-cell>
        </table:table-row>
        <table:table-row table:style-name="Tabella2.1">
          <table:table-cell table:style-name="Tabella2.A1" office:value-type="string">
            <text:p text:style-name="Standard"><text:span text:style-name="T3">Geräusch</text:span></text:p>
          </table:table-cell>
          <table:table-cell table:style-name="Tabella2.A1" office:value-type="string">
            <text:p text:style-name="Standard"><text:span text:style-name="T13">Noise burst + HPF aggressivo. Tensione modula cutoff e densità burst.</text:span></text:p>
          </table:table-cell>
        </table:table-row>
        <table:table-row table:style-name="Tabella2.1">
          <table:table-cell table:style-name="Tabella2.A1" office:value-type="string">
            <text:p text:style-name="Standard"><text:span text:style-name="T3">Kadenz</text:span></text:p>
          </table:table-cell>
          <table:table-cell table:style-name="Tabella2.A1" office:value-type="string">
            <text:p text:style-name="Standard"><text:span text:style-name="T13">Granulazione con finestra corta. Tensione modula scatter e densità.</text:span></text:p>
          </table:table-cell>
        </table:table-row>
        <table:table-row table:style-name="Tabella2.1">
          <table:table-cell table:style-name="Tabella2.A1" office:value-type="string">
            <text:p text:style-name="Standard"><text:span text:style-name="T3">Textur</text:span></text:p>
          </table:table-cell>
          <table:table-cell table:style-name="Tabella2.A1" office:value-type="string">
            <text:p text:style-name="Standard"><text:span text:style-name="T13">Shimmer reverb (freeze parziale). Tensione modula feedback e shimmer mix.</text:span></text:p>
          </table:table-cell>
        </table:table-row>
        <table:table-row table:style-name="Tabella2.1">
          <table:table-cell table:style-name="Tabella2.A1" office:value-type="string">
            <text:p text:style-name="Standard"><text:span text:style-name="T3">Stille</text:span></text:p>
          </table:table-cell>
          <table:table-cell table:style-name="Tabella2.A1" office:value-type="string">
            <text:p text:style-name="Standard"><text:span text:style-name="T13">Fade out progressivo, solo inviluppo d'ampiezza. Output silenzioso ma nodo attivo.</text:span></text:p>
          </table:table-cell>
        </table:table-row>
      </table:table>
      <text:p text:style-name="P15"/>
      <text:p text:style-name="P14"><text:span text:style-name="T11">Parametro CPU: </text:span><text:span text:style-name="T18">masterVol = 1.6</text:span><text:span text:style-name="T11">, Limiter inserito nel bus spatializer per proteggere l'output.</text:span></text:p>
      <text:h text:style-name="P1" text:outline-level="2"><text:span text:style-name="T16">3.3 <text:s/>Pannello di regia OSC</text:span></text:h>
      <text:p text:style-name="P14"><text:span text:style-name="T11">La timeline di Remnant (in fondo alla mappa UMAP) funge da pannello di regia. Ogni blocco colorato corrisponde a un gesto. Il click invia via OSC:</text:span></text:p>
      <text:p text:style-name="P17"><text:span text:style-name="T17">/remnant/gesture <text:s text:c="2"/>gesto_index <text:s/>tension <text:s/>lachenmann_cat</text:span></text:p>
      <text:p text:style-name="P14"><text:span text:style-name="T11">SC riceve il messaggio e aggiorna immediatamente </text:span><text:span text:style-name="T12">tutti i canali attivi</text:span><text:span text:style-name="T11"> con la nuova </text:span><text:soft-page-break/><text:span text:style-name="T11">categoria Lachenmann e il livello di tensione. La transizione è sample-accurate tramite </text:span><text:span text:style-name="T18">Lag.kr</text:span><text:span text:style-name="T11">.</text:span></text:p>
      <text:h text:style-name="P1" text:outline-level="2"><text:span text:style-name="T16">3.4 <text:s/>Comandi OSC rapidi</text:span></text:h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Standard"><text:span text:style-name="T3">/remnant/gesture n</text:span></text:p>
          </table:table-cell>
          <table:table-cell table:style-name="Tabella3.A1" office:value-type="string">
            <text:p text:style-name="Standard"><text:span text:style-name="T13">Attiva gesto n (0-based), aggiorna Lachenmann e tensione</text:span></text:p>
          </table:table-cell>
        </table:table-row>
        <table:table-row table:style-name="Tabella3.1">
          <table:table-cell table:style-name="Tabella3.A1" office:value-type="string">
            <text:p text:style-name="Standard"><text:span text:style-name="T3">/remnant/tension t</text:span></text:p>
          </table:table-cell>
          <table:table-cell table:style-name="Tabella3.A1" office:value-type="string">
            <text:p text:style-name="Standard"><text:span text:style-name="T13">Imposta tensione globale 0.0–1.0 (sovrascrive FluCoMa)</text:span></text:p>
          </table:table-cell>
        </table:table-row>
        <table:table-row table:style-name="Tabella3.1">
          <table:table-cell table:style-name="Tabella3.A1" office:value-type="string">
            <text:p text:style-name="Standard"><text:span text:style-name="T3">/remnant/mute ch</text:span></text:p>
          </table:table-cell>
          <table:table-cell table:style-name="Tabella3.A1" office:value-type="string">
            <text:p text:style-name="Standard"><text:span text:style-name="T13">Mute canale ch (0–15)</text:span></text:p>
          </table:table-cell>
        </table:table-row>
        <table:table-row table:style-name="Tabella3.1">
          <table:table-cell table:style-name="Tabella3.A1" office:value-type="string">
            <text:p text:style-name="Standard"><text:span text:style-name="T3">/remnant/solo ch</text:span></text:p>
          </table:table-cell>
          <table:table-cell table:style-name="Tabella3.A1" office:value-type="string">
            <text:p text:style-name="Standard"><text:span text:style-name="T13">Solo canale ch</text:span></text:p>
          </table:table-cell>
        </table:table-row>
        <table:table-row table:style-name="Tabella3.1">
          <table:table-cell table:style-name="Tabella3.A1" office:value-type="string">
            <text:p text:style-name="Standard"><text:span text:style-name="T3">/remnant/panic</text:span></text:p>
          </table:table-cell>
          <table:table-cell table:style-name="Tabella3.A1" office:value-type="string">
            <text:p text:style-name="Standard"><text:span text:style-name="T13">Azzera tutti i synth → Neutro, tensione 0.0</text:span></text:p>
          </table:table-cell>
        </table:table-row>
        <table:table-row table:style-name="Tabella3.1">
          <table:table-cell table:style-name="Tabella3.A1" office:value-type="string">
            <text:p text:style-name="Standard"><text:span text:style-name="T3">/remnant/volume v</text:span></text:p>
          </table:table-cell>
          <table:table-cell table:style-name="Tabella3.A1" office:value-type="string">
            <text:p text:style-name="Standard"><text:span text:style-name="T13">masterVol globale (default 1.6)</text:span></text:p>
          </table:table-cell>
        </table:table-row>
      </table:table>
      <text:p text:style-name="P11"/>
      <text:p text:style-name="P10"/>
      <text:h text:style-name="P2" text:outline-level="1"><text:span text:style-name="T2">4. <text:s/>FluCoMa — analisi in tempo reale</text:span></text:h>
      <text:h text:style-name="P1" text:outline-level="2"><text:span text:style-name="T16">4.1 <text:s/>Descrittori analizzati</text:span></text:h>
      <text:p text:style-name="P14"><text:span text:style-name="T18">remnant_flucos.scd</text:span><text:span text:style-name="T11"> analizza continuamente il </text:span><text:span text:style-name="T12">mix mono</text:span><text:span text:style-name="T11"> dell'orchestra su un bus dedicato. I descrittori attivi sono:</text:span></text:p>
      <text:list xml:id="list1883207596" text:continue-numbering="true" text:style-name="WWNum2">
        <text:list-item>
          <text:p text:style-name="P4"><text:span text:style-name="T19">FluidLoudness</text:span><text:span text:style-name="T14"> <text:s/>— loudness istantanea (LUFS) e true peak</text:span></text:p>
        </text:list-item>
        <text:list-item>
          <text:p text:style-name="P4"><text:span text:style-name="T19">FluidSpectralShape</text:span><text:span text:style-name="T14"> <text:s/>— centroide, spread, skewness, kurtosis, rolloff, flatness, crest</text:span></text:p>
        </text:list-item>
      </text:list>
      <text:p text:style-name="P14"><text:span text:style-name="T11">Il risultato viene mappato su un valore di tensione normalizzato 0.0–1.0.</text:span></text:p>
      <text:h text:style-name="P1" text:outline-level="2"><text:span text:style-name="T16">4.2 <text:s/>Modulazione della tensione</text:span></text:h>
      <text:p text:style-name="P14"><text:span text:style-name="T11">La tensione FluCoMa </text:span><text:span text:style-name="T12">aggiunge</text:span><text:span text:style-name="T11"> al valore di regia, non lo sovrascrive:</text:span></text:p>
      <text:p text:style-name="P17"><text:span text:style-name="T17">tension_out = tension_regia + (flucos_tension * 0.4).clip(0, 1 - tension_regia)</text:span></text:p>
      <text:p text:style-name="P14"><text:span text:style-name="T11">Il contributo massimo di FluCoMa è </text:span><text:span text:style-name="T12">0.4</text:span><text:span text:style-name="T11">. Se la regia è già a 0.8, FluCoMa può alzare al massimo a 1.0. La regia mantiene sempre il controllo narrativo.</text:span></text:p>
      <text:h text:style-name="P1" text:outline-level="2"><text:span text:style-name="T16">4.3 <text:s/>Calibrazione</text:span></text:h>
      <text:p text:style-name="P14"><text:span text:style-name="T11">All'inizio del concerto esegui la calibrazione del livello medio dell'orchestra:</text:span></text:p>
      <text:p text:style-name="P17"><text:span text:style-name="T17">~flucos.calibrate; <text:s text:c="2"/>// registra 10 secondi di riferimento</text:span></text:p>
      <text:p text:style-name="P11"/>
      <text:p text:style-name="P10"/>
      <text:h text:style-name="P2" text:outline-level="1"><text:span text:style-name="T2">5. <text:s/>Remnant Explorer (Dash)</text:span></text:h>
      <text:h text:style-name="P1" text:outline-level="2"><text:span text:style-name="T16">5.1 <text:s/>Avvio</text:span></text:h>
      <text:p text:style-name="P17"><text:span text:style-name="T17">cd ~/Desktop/remnant</text:span></text:p>
      <text:p text:style-name="P17"><text:span text:style-name="T17">python3 contimbre_explorer.py</text:span></text:p>
      <text:p text:style-name="P17"><text:span text:style-name="T17"># → http://127.0.0.1:8050</text:span></text:p>
      <text:h text:style-name="P1" text:outline-level="2"><text:span text:style-name="T16">5.2 <text:s/>Filtro strumenti e UMAP</text:span></text:h>
      <text:p text:style-name="P14"><text:span text:style-name="T11">Il pannello sinistro mostra tutte le famiglie del corpus con checkbox a due livelli (famiglia / strumento singolo). Dopo la selezione, </text:span><text:span text:style-name="T12">Applica filtro</text:span><text:span text:style-name="T11"> ricalcola lo spazio UMAP con </text:span><text:soft-page-break/><text:span text:style-name="T11">ponderazione McAdams:</text:span></text:p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Standard"><text:span text:style-name="T3">spectral_center</text:span></text:p>
          </table:table-cell>
          <table:table-cell table:style-name="Tabella4.A1" office:value-type="string">
            <text:p text:style-name="Standard"><text:span text:style-name="T13">peso 3.0 <text:s/>(dimensione più saliente)</text:span></text:p>
          </table:table-cell>
        </table:table-row>
        <table:table-row table:style-name="Tabella4.1">
          <table:table-cell table:style-name="Tabella4.A1" office:value-type="string">
            <text:p text:style-name="Standard"><text:span text:style-name="T3">spectral_complexity</text:span></text:p>
          </table:table-cell>
          <table:table-cell table:style-name="Tabella4.A1" office:value-type="string">
            <text:p text:style-name="Standard"><text:span text:style-name="T13">peso 2.0</text:span></text:p>
          </table:table-cell>
        </table:table-row>
        <table:table-row table:style-name="Tabella4.1">
          <table:table-cell table:style-name="Tabella4.A1" office:value-type="string">
            <text:p text:style-name="Standard"><text:span text:style-name="T3">pitch</text:span></text:p>
          </table:table-cell>
          <table:table-cell table:style-name="Tabella4.A1" office:value-type="string">
            <text:p text:style-name="Standard"><text:span text:style-name="T13">peso 1.5</text:span></text:p>
          </table:table-cell>
        </table:table-row>
        <table:table-row table:style-name="Tabella4.1">
          <table:table-cell table:style-name="Tabella4.A1" office:value-type="string">
            <text:p text:style-name="Standard"><text:span text:style-name="T3">dynamic, duration, intensity</text:span></text:p>
          </table:table-cell>
          <table:table-cell table:style-name="Tabella4.A1" office:value-type="string">
            <text:p text:style-name="Standard"><text:span text:style-name="T13">peso 1.0 ciascuno</text:span></text:p>
          </table:table-cell>
        </table:table-row>
      </table:table>
      <text:p text:style-name="P14"><text:span text:style-name="T11">Il campione è limitato a </text:span><text:span text:style-name="T12">300 suoni per famiglia</text:span><text:span text:style-name="T11"> per velocità.</text:span></text:p>
      <text:h text:style-name="P1" text:outline-level="2"><text:span text:style-name="T16">5.3 <text:s/>Generazione della composizione</text:span></text:h>
      <text:p text:style-name="P14"><text:span text:style-name="T11">I parametri compositivi nel pannello sinistro:</text:span>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Standard"><text:span text:style-name="T3">Durata (sec)</text:span></text:p>
          </table:table-cell>
          <table:table-cell table:style-name="Tabella5.A1" office:value-type="string">
            <text:p text:style-name="Standard"><text:span text:style-name="T13">Durata totale della composizione. I gesti vengono compressi/allungati proporzionalmente alla tensione (vedi §5.5).</text:span></text:p>
          </table:table-cell>
        </table:table-row>
        <table:table-row table:style-name="Tabella5.1">
          <table:table-cell table:style-name="Tabella5.A1" office:value-type="string">
            <text:p text:style-name="Standard"><text:span text:style-name="T3">Numero gesti</text:span></text:p>
          </table:table-cell>
          <table:table-cell table:style-name="Tabella5.A1" office:value-type="string">
            <text:p text:style-name="Standard"><text:span text:style-name="T13">Gesti totali (1–15). Ogni gesto ottiene un dropdown Lachenmann indipendente.</text:span></text:p>
          </table:table-cell>
        </table:table-row>
        <table:table-row table:style-name="Tabella5.1">
          <table:table-cell table:style-name="Tabella5.A1" office:value-type="string">
            <text:p text:style-name="Standard"><text:span text:style-name="T3">Passi per gesto</text:span></text:p>
          </table:table-cell>
          <table:table-cell table:style-name="Tabella5.A1" office:value-type="string">
            <text:p text:style-name="Standard"><text:span text:style-name="T13">Numero di passi del percorso browniano per gesto.</text:span></text:p>
          </table:table-cell>
        </table:table-row>
        <table:table-row table:style-name="Tabella5.1">
          <table:table-cell table:style-name="Tabella5.A1" office:value-type="string">
            <text:p text:style-name="Standard"><text:span text:style-name="T3">Volatilità iniziale</text:span></text:p>
          </table:table-cell>
          <table:table-cell table:style-name="Tabella5.A1" office:value-type="string">
            <text:p text:style-name="Standard"><text:span text:style-name="T13">Ampiezza dei salti browniani al primo gesto. Evolve stocasticamente.</text:span></text:p>
          </table:table-cell>
        </table:table-row>
        <table:table-row table:style-name="Tabella5.1">
          <table:table-cell table:style-name="Tabella5.A1" office:value-type="string">
            <text:p text:style-name="Standard"><text:span text:style-name="T3">Deriva stocastica</text:span></text:p>
          </table:table-cell>
          <table:table-cell table:style-name="Tabella5.A1" office:value-type="string">
            <text:p text:style-name="Standard"><text:span text:style-name="T13">Rumore aggiunto a volatilità e deriva ad ogni cambio gesto.</text:span></text:p>
          </table:table-cell>
        </table:table-row>
        <table:table-row table:style-name="Tabella5.1">
          <table:table-cell table:style-name="Tabella5.A1" office:value-type="string">
            <text:p text:style-name="Standard"><text:span text:style-name="T3">Soglia Lerdahl</text:span></text:p>
          </table:table-cell>
          <table:table-cell table:style-name="Tabella5.A1" office:value-type="string">
            <text:p text:style-name="Standard"><text:span text:style-name="T13">Se &gt; 0: suoni più distanti della soglia nel piano UMAP vengono saltati (rarefazione timbrica).</text:span></text:p>
          </table:table-cell>
        </table:table-row>
        <table:table-row table:style-name="Tabella5.1">
          <table:table-cell table:style-name="Tabella5.A1" office:value-type="string">
            <text:p text:style-name="Standard"><text:span text:style-name="T3">Direzione Lachenmann</text:span></text:p>
          </table:table-cell>
          <table:table-cell table:style-name="Tabella5.A1" office:value-type="string">
            <text:p text:style-name="Standard"><text:span text:style-name="T13">Categoria target per ogni gesto. Il percorso browniano viene attrattato verso il centroide della categoria.</text:span></text:p>
          </table:table-cell>
        </table:table-row>
        <table:table-row table:style-name="Tabella5.1">
          <table:table-cell table:style-name="Tabella5.A1" office:value-type="string">
            <text:p text:style-name="Standard"><text:span text:style-name="T3">Forza attrazione</text:span></text:p>
          </table:table-cell>
          <table:table-cell table:style-name="Tabella5.A1" office:value-type="string">
            <text:p text:style-name="Standard"><text:span text:style-name="T13">Peso dell'attrazione verso il centroide Lachenmann (0 = puramente browniano, 1 = deterministico).</text:span></text:p>
          </table:table-cell>
        </table:table-row>
      </table:table>
      <text:h text:style-name="P1" text:outline-level="2"><text:span text:style-name="T16">5.4 <text:s/>Distribuzione temporale browniana</text:span></text:h>
      <text:p text:style-name="P14"><text:span text:style-name="T11">I tempi degli eventi all'interno di ogni gesto seguono le </text:span><text:span text:style-name="T12">distanze euclidee</text:span><text:span text:style-name="T11"> tra i passi consecutivi del percorso browniano nel piano UMAP. Un salto lungo nel piano timbrico produce un intervallo temporale lungo nella partitura — il tempo diventa indicizzazione della distanza sonora.</text:span></text:p>
      <text:p text:style-name="P17"><text:span text:style-name="T17">dist_i = euclidean(path[i], path[i+1])</text:span></text:p>
      <text:p text:style-name="P17"><text:span text:style-name="T17">t_event_i = t_start + sum(dist_0..i) / sum(all_dists) * gesture_duration</text:span></text:p>
      <text:h text:style-name="P1" text:outline-level="2"><text:span text:style-name="T16">5.5 <text:s/>Contrazione temporale Ferneyhough</text:span></text:h>
      <text:p text:style-name="P14"><text:span text:style-name="T11">Le durate dei gesti non sono uniformi. Alta tensione produce gesti brevi, bassa tensione gesti lunghi — la curva è logaritmica inversa:</text:span></text:p>
      <text:p text:style-name="P17"><text:span text:style-name="T17">dur_i = base_dur * exp(-2.0 * tension_i)</text:span></text:p>
      <text:p text:style-name="P17"><text:span text:style-name="T17"># Normalizzato: sum(dur_i) == durata_totale</text:span></text:p>
      <text:p text:style-name="P14"><text:span text:style-name="T11">Il risultato è una forma macroscopica dove i momenti di massima tensione sono compressi e quelli di distensione si dilatano, come nella struttura metrica di Ferneyhough.</text:span></text:p>
      <text:h text:style-name="P1" text:outline-level="2"><text:span text:style-name="T16">5.6 <text:s/>Gestione partiture</text:span></text:h>
      <text:p text:style-name="P14"><text:span text:style-name="T11">Le partiture (file JSON) sono salvate nella cartella </text:span><text:span text:style-name="T18">scores/</text:span><text:span text:style-name="T11"> relativa allo script. Un dropdown in cima al pannello permette di:</text:span></text:p>
      <text:list xml:id="list1205417027" text:continue-numbering="true" text:style-name="WWNum2">
        <text:list-item>
          <text:p text:style-name="P4"><text:span text:style-name="T14">Salvare la composizione corrente con nome libero</text:span></text:p>
        </text:list-item>
        <text:list-item>
          <text:p text:style-name="P4"><text:span text:style-name="T14">Caricare una partitura precedente</text:span></text:p>
        </text:list-item>
        <text:list-item>
          <text:p text:style-name="P4"><text:span text:style-name="T14">Eliminare partiture salvate</text:span></text:p>
        </text:list-item>
      </text:list>
      <text:p text:style-name="P14"><text:span text:style-name="T11">Il percorso è </text:span><text:span text:style-name="T12">relativo allo script</text:span><text:span text:style-name="T11">: il sistema funziona su qualsiasi computer senza modifiche di path.</text:span></text:p>
      <text:p text:style-name="P11"><text:soft-page-break/></text:p>
      <text:p text:style-name="P10"/>
      <text:h text:style-name="P2" text:outline-level="1"><text:span text:style-name="T2">6. <text:s/>Partitura grafica</text:span></text:h>
      <text:h text:style-name="P1" text:outline-level="2"><text:span text:style-name="T16">6.1 <text:s/>Notazione</text:span></text:h>
      <text:p text:style-name="P14"><text:span text:style-name="T11">La partitura è accessibile cliccando su un blocco della timeline o navigando a </text:span><text:span text:style-name="T18">/partitura/N</text:span><text:span text:style-name="T11">. Il sistema di notazione è ispirato a Feldman, Lachenmann e Bwa Kayiman:</text:span></text:p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Standard"><text:span text:style-name="T3">Asse X</text:span></text:p>
          </table:table-cell>
          <table:table-cell table:style-name="Tabella6.A1" office:value-type="string">
            <text:p text:style-name="Standard"><text:span text:style-name="T13">Tempo in secondi (relativo al gesto)</text:span></text:p>
          </table:table-cell>
        </table:table-row>
        <table:table-row table:style-name="Tabella6.1">
          <table:table-cell table:style-name="Tabella6.A1" office:value-type="string">
            <text:p text:style-name="Standard"><text:span text:style-name="T3">Asse Y</text:span></text:p>
          </table:table-cell>
          <table:table-cell table:style-name="Tabella6.A1" office:value-type="string">
            <text:p text:style-name="Standard"><text:span text:style-name="T13">Posizione azimutale 0–360° nel sistema 8 canali</text:span></text:p>
          </table:table-cell>
        </table:table-row>
        <table:table-row table:style-name="Tabella6.1">
          <table:table-cell table:style-name="Tabella6.A1" office:value-type="string">
            <text:p text:style-name="Standard"><text:span text:style-name="T3">Barra orizzontale</text:span></text:p>
          </table:table-cell>
          <table:table-cell table:style-name="Tabella6.A1" office:value-type="string">
            <text:p text:style-name="Standard"><text:span text:style-name="T13">Durata visiva dell'evento (modulata dall'inviluppo SVG)</text:span></text:p>
          </table:table-cell>
        </table:table-row>
        <table:table-row table:style-name="Tabella6.1">
          <table:table-cell table:style-name="Tabella6.A1" office:value-type="string">
            <text:p text:style-name="Standard"><text:span text:style-name="T3">Simbolo</text:span></text:p>
          </table:table-cell>
          <table:table-cell table:style-name="Tabella6.A1" office:value-type="string">
            <text:p text:style-name="Standard"><text:span text:style-name="T13">Categoria Lachenmann: cerchio aperto=Klang, cerchio=Farbklang, quadrato=Geräusch, diamante=Kadenz, croce=Textur</text:span></text:p>
          </table:table-cell>
        </table:table-row>
        <table:table-row table:style-name="Tabella6.1">
          <table:table-cell table:style-name="Tabella6.A1" office:value-type="string">
            <text:p text:style-name="Standard"><text:span text:style-name="T3">Dimensione</text:span></text:p>
          </table:table-cell>
          <table:table-cell table:style-name="Tabella6.A1" office:value-type="string">
            <text:p text:style-name="Standard"><text:span text:style-name="T13">Tensione timbrica (0–1)</text:span></text:p>
          </table:table-cell>
        </table:table-row>
        <table:table-row table:style-name="Tabella6.1">
          <table:table-cell table:style-name="Tabella6.A1" office:value-type="string">
            <text:p text:style-name="Standard"><text:span text:style-name="T3">Etichetta</text:span></text:p>
          </table:table-cell>
          <table:table-cell table:style-name="Tabella6.A1" office:value-type="string">
            <text:p text:style-name="Standard"><text:span text:style-name="T13">Nome strumento + canale di panning</text:span></text:p>
          </table:table-cell>
        </table:table-row>
      </table:table>
      <text:h text:style-name="P1" text:outline-level="2"><text:span text:style-name="T16">6.2 <text:s/>Griglia temporale</text:span></text:h>
      <text:p text:style-name="P14"><text:span text:style-name="T11">Griglia verticale ogni </text:span><text:span text:style-name="T12">5 secondi</text:span><text:span text:style-name="T11"> con marcatura numerica ogni </text:span><text:span text:style-name="T12">10 secondi</text:span><text:span text:style-name="T11"> sopra la partitura. Le barre degli eventi sono clippate ai margini del gesto.</text:span></text:p>
      <text:p text:style-name="P14"><text:span text:style-name="T11">In fondo alla partitura è visualizzata la </text:span><text:span text:style-name="T12">banda di pulsazione</text:span><text:span text:style-name="T11">: frazioni proporzionali alle distanze browniane, con denominatore minimo indipendente per evento e somma in millisecondi a destra.</text:span></text:p>
      <text:h text:style-name="P1" text:outline-level="2"><text:span text:style-name="T16">6.3 <text:s/>Inviluppi SVG (editor BPF)</text:span></text:h>
      <text:p text:style-name="P14"><text:span text:style-name="T11">Ogni gesto può avere un inviluppo che modula onset, durata e dinamica degli eventi. Il pulsante </text:span><text:span text:style-name="T12">∿ inviluppo</text:span><text:span text:style-name="T11"> apre l'editor BPF in modale:</text:span></text:p>
      <text:list xml:id="list1980071179" text:continue-numbering="true" text:style-name="WWNum2">
        <text:list-item>
          <text:p text:style-name="P4"><text:span text:style-name="T14">Click su area vuota → aggiunge punto</text:span></text:p>
        </text:list-item>
        <text:list-item>
          <text:p text:style-name="P4"><text:span text:style-name="T14">Click su punto esistente → rimuove</text:span></text:p>
        </text:list-item>
        <text:list-item>
          <text:p text:style-name="P4"><text:span text:style-name="T15">Salva SVG</text:span><text:span text:style-name="T14"> → scrive </text:span><text:span text:style-name="T19">scores/envelopes/gesto_NN.svg</text:span></text:p>
        </text:list-item>
        <text:list-item>
          <text:p text:style-name="P4"><text:span text:style-name="T15">Cancella SVG</text:span><text:span text:style-name="T14"> → elimina il file</text:span></text:p>
        </text:list-item>
      </text:list>
      <text:p text:style-name="P14"><text:span text:style-name="T11">L'inviluppo viene letto automaticamente alla riapertura della partitura.</text:span></text:p>
      <text:p text:style-name="P16"><text:span text:style-name="T6">I file SVG degli inviluppi sono compatibili con il formato OpenMusic e possono essere importati direttamente in OM/o7.</text:span></text:p>
      <text:p text:style-name="P11"/>
      <text:p text:style-name="P10"/>
      <text:h text:style-name="P2" text:outline-level="1"><text:span text:style-name="T2">7. <text:s/>Export</text:span></text:h>
      <text:h text:style-name="P1" text:outline-level="2"><text:span text:style-name="T16">7.1 <text:s/>Export per Orchestrator (.cOrc)</text:span></text:h>
      <text:p text:style-name="P14"><text:span text:style-name="T11">Il bottone </text:span><text:span text:style-name="T12">Esporta per Orchestrator</text:span><text:span text:style-name="T11"> chiama SBCL e scrive un file </text:span><text:span text:style-name="T18">.cOrc</text:span><text:span text:style-name="T11"> per gesto nella cartella:</text:span></text:p>
      <text:p text:style-name="P17"><text:span text:style-name="T17">.../conTimbre Standard V2/algorithmic orchestration/brownian_gesto_NN</text:span></text:p>
      <text:h text:style-name="P1" text:outline-level="2"><text:soft-page-break/><text:span text:style-name="T16">7.2 <text:s/>Export per ePlayer (.cePlayerOrc)</text:span></text:h>
      <text:p text:style-name="P14"><text:span text:style-name="T12">Esporta per ePlayer</text:span><text:span text:style-name="T11"> genera un'orchestra ePlayer per gesto (max 128 chiavi MIDI, </text:span><text:span text:style-name="T18">playing_mode = 1</text:span><text:span text:style-name="T11">). Il processo:</text:span></text:p>
      <text:list xml:id="list1399052082" text:continue-numbering="true" text:style-name="WWNum2">
        <text:list-item>
          <text:p text:style-name="P4"><text:span text:style-name="T14">Per ogni suono browniano cerca il keygroup corrispondente con </text:span><text:span text:style-name="T19">find_keygroup_of_contimbre_sound</text:span></text:p>
        </text:list-item>
        <text:list-item>
          <text:p text:style-name="P4"><text:span text:style-name="T14">Assembla l'orchestra con </text:span><text:span text:style-name="T19">make-eplayer_orchestra / voice / program</text:span></text:p>
        </text:list-item>
        <text:list-item>
          <text:p text:style-name="P4"><text:span text:style-name="T14">Scrive con </text:span><text:span text:style-name="T19">write_eplayer_orchestra</text:span></text:p>
        </text:list-item>
      </text:list>
      <text:p text:style-name="P14"><text:span text:style-name="T11">Output:</text:span></text:p>
      <text:p text:style-name="P17"><text:span text:style-name="T17">.../ePlayer orchestras/contimbre_brownian_gesto_NN.cePlayerOrc</text:span></text:p>
      <text:h text:style-name="P1" text:outline-level="2"><text:span text:style-name="T16">7.3 <text:s/>Risoluzione dei modi testuali</text:span></text:h>
      <text:p text:style-name="P14"><text:span text:style-name="T11">La funzione </text:span><text:span text:style-name="T18">resolve_modes_via_sbcl</text:span><text:span text:style-name="T11"> fa una singola chiamata SBCL per tutti i suoni unici della composizione, recuperando il testo del modo di esecuzione da </text:span><text:span text:style-name="T18">contimbre_library.lisp</text:span><text:span text:style-name="T11">. Il risultato viene usato nella partitura grafica e nel JSON della partitura.</text:span></text:p>
      <text:p text:style-name="P11"/>
      <text:p text:style-name="P10"/>
      <text:h text:style-name="P2" text:outline-level="1"><text:span text:style-name="T2">8. <text:s/>Flusso di lavoro — concerto</text:span></text:h>
      <text:h text:style-name="P1" text:outline-level="2"><text:span text:style-name="T16">Prima del concerto</text:span></text:h>
      <text:p text:style-name="P19"><text:span text:style-name="T11">1. Estrai il corpus e ricalcola UMAP se il corpus è cambiato:</text:span></text:p>
      <text:p text:style-name="P17"><text:span text:style-name="T17">sbcl --load export_tsv.lisp</text:span></text:p>
      <text:p text:style-name="P17"><text:span text:style-name="T17">python3 umap_full.py</text:span></text:p>
      <text:p text:style-name="P19"><text:span text:style-name="T11">2. Carica una partitura salvata o genera una nuova composizione.</text:span></text:p>
      <text:p text:style-name="P19"><text:span text:style-name="T11">3. Avvia SuperCollider:</text:span></text:p>
      <text:p text:style-name="P17"><text:span text:style-name="T17">// In SC IDE:</text:span></text:p>
      <text:p text:style-name="P17"><text:span text:style-name="T17">Document.open("remnant_sc.scd"); <text:s/>// Cmd+Return per valutare</text:span></text:p>
      <text:p text:style-name="P17"><text:span text:style-name="T17">Document.open("remnant_flucos.scd");</text:span></text:p>
      <text:p text:style-name="P19"><text:span text:style-name="T11">4. Calibra FluCoMa con </text:span><text:span text:style-name="T18">~flucos.calibrate</text:span><text:span text:style-name="T11"> durante il soundcheck.</text:span></text:p>
      <text:p text:style-name="P19"><text:span text:style-name="T11">5. Avvia Remnant Explorer:</text:span></text:p>
      <text:p text:style-name="P17"><text:span text:style-name="T17">python3 contimbre_explorer.py</text:span></text:p>
      <text:h text:style-name="P1" text:outline-level="2"><text:span text:style-name="T16">Durante il concerto</text:span></text:h>
      <text:list xml:id="list819231712" text:continue-numbering="true" text:style-name="WWNum2">
        <text:list-item>
          <text:p text:style-name="P4"><text:span text:style-name="T14">Usa la </text:span><text:span text:style-name="T15">timeline</text:span><text:span text:style-name="T14"> in fondo alla mappa per navigare i gesti in tempo reale</text:span></text:p>
        </text:list-item>
        <text:list-item>
          <text:p text:style-name="P4"><text:span text:style-name="T14">Ogni click invia </text:span><text:span text:style-name="T19">/remnant/gesture</text:span><text:span text:style-name="T14"> a SC — la transizione è istantanea</text:span></text:p>
        </text:list-item>
        <text:list-item>
          <text:p text:style-name="P4"><text:span text:style-name="T14">Il cursore di </text:span><text:span text:style-name="T15">Forza attrazione</text:span><text:span text:style-name="T14"> può essere regolato live per variare l'aderenza alla direzione Lachenmann</text:span></text:p>
        </text:list-item>
        <text:list-item>
          <text:p text:style-name="P4"><text:span text:style-name="T14">FluCoMa aggiunge tensione automaticamente; sovrascrivila con </text:span><text:span text:style-name="T19">/remnant/tension t</text:span><text:span text:style-name="T14"> se necessario</text:span></text:p>
        </text:list-item>
        <text:list-item>
          <text:p text:style-name="P4"><text:span text:style-name="T14">In caso di problemi: </text:span><text:span text:style-name="T19">/remnant/panic</text:span><text:span text:style-name="T14"> azzera tutto a Neutro</text:span></text:p>
        </text:list-item>
      </text:list>
      <text:p text:style-name="P11"/>
      <text:p text:style-name="P10"/>
      <text:h text:style-name="P2" text:outline-level="1"><text:soft-page-break/><text:span text:style-name="T2">9. <text:s/>Risoluzione problemi</text:span></text:h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Standard"><text:span text:style-name="T3">SBCL non trovato</text:span></text:p>
          </table:table-cell>
          <table:table-cell table:style-name="Tabella7.A1" office:value-type="string">
            <text:p text:style-name="Standard"><text:span text:style-name="T13">Aggiungi sbcl al PATH: export PATH=/usr/local/bin:$PATH</text:span></text:p>
          </table:table-cell>
        </table:table-row>
        <table:table-row table:style-name="Tabella7.1">
          <table:table-cell table:style-name="Tabella7.A1" office:value-type="string">
            <text:p text:style-name="Standard"><text:span text:style-name="T3">UMAP lento</text:span></text:p>
          </table:table-cell>
          <table:table-cell table:style-name="Tabella7.A1" office:value-type="string">
            <text:p text:style-name="Standard"><text:span text:style-name="T13">Riduci il campione (parametro max_per_family in umap_full.py). Default 300.</text:span></text:p>
          </table:table-cell>
        </table:table-row>
        <table:table-row table:style-name="Tabella7.1">
          <table:table-cell table:style-name="Tabella7.A1" office:value-type="string">
            <text:p text:style-name="Standard"><text:span text:style-name="T3">OSC non ricevuto</text:span></text:p>
          </table:table-cell>
          <table:table-cell table:style-name="Tabella7.A1" office:value-type="string">
            <text:p text:style-name="Standard"><text:span text:style-name="T13">Verifica che SC ascolti su porta 57120 e che il firewall non blocchi UDP locale.</text:span></text:p>
          </table:table-cell>
        </table:table-row>
        <table:table-row table:style-name="Tabella7.1">
          <table:table-cell table:style-name="Tabella7.A1" office:value-type="string">
            <text:p text:style-name="Standard"><text:span text:style-name="T3">Distorsione audio</text:span></text:p>
          </table:table-cell>
          <table:table-cell table:style-name="Tabella7.A1" office:value-type="string">
            <text:p text:style-name="Standard"><text:span text:style-name="T13">Abbassa masterVol: /remnant/volume 0.8. Verifica che Limiter sia attivo nel bus spatializer.</text:span></text:p>
          </table:table-cell>
        </table:table-row>
        <table:table-row table:style-name="Tabella7.1">
          <table:table-cell table:style-name="Tabella7.A1" office:value-type="string">
            <text:p text:style-name="Standard"><text:span text:style-name="T3">Partitura vuota</text:span></text:p>
          </table:table-cell>
          <table:table-cell table:style-name="Tabella7.A1" office:value-type="string">
            <text:p text:style-name="Standard"><text:span text:style-name="T13">Genera prima la composizione, poi clicca Genera partitura.</text:span></text:p>
          </table:table-cell>
        </table:table-row>
        <table:table-row table:style-name="Tabella7.1">
          <table:table-cell table:style-name="Tabella7.A1" office:value-type="string">
            <text:p text:style-name="Standard"><text:span text:style-name="T3">FluCoMa: NaN in tensione</text:span></text:p>
          </table:table-cell>
          <table:table-cell table:style-name="Tabella7.A1" office:value-type="string">
            <text:p text:style-name="Standard"><text:span text:style-name="T13">Ricalibra con ~flucos.calibrate. Può succedere se il bus di input è silenzioso all'avvio.</text:span></text:p>
          </table:table-cell>
        </table:table-row>
        <table:table-row table:style-name="Tabella7.1">
          <table:table-cell table:style-name="Tabella7.A1" office:value-type="string">
            <text:p text:style-name="Standard"><text:span text:style-name="T3">Export ePlayer lento</text:span></text:p>
          </table:table-cell>
          <table:table-cell table:style-name="Tabella7.A1" office:value-type="string">
            <text:p text:style-name="Standard"><text:span text:style-name="T13">Normale per &gt;8 gesti. SBCL impiega ~30s per gesto. Esporta in background.</text:span></text:p>
          </table:table-cell>
        </table:table-row>
      </table:table>
      <text:p text:style-name="P11"/>
      <text:p text:style-name="P10"/>
      <text:h text:style-name="P2" text:outline-level="1"><text:span text:style-name="T2">Appendice — struttura file</text:span></text:h>
      <text:p text:style-name="P17"><text:span text:style-name="T17">remnant/</text:span></text:p>
      <text:p text:style-name="P17"><text:span text:style-name="T17">├── contimbre_explorer.py <text:s text:c="2"/># Applicazione principale Dash</text:span></text:p>
      <text:p text:style-name="P17"><text:span text:style-name="T17">├── umap_full.py <text:s text:c="11"/># Calcolo UMAP con ponderazione McAdams</text:span></text:p>
      <text:p text:style-name="P17"><text:span text:style-name="T17">├── plot_brownian.py <text:s text:c="7"/># Plot matplotlib del percorso browniano</text:span></text:p>
      <text:p text:style-name="P17"><text:span text:style-name="T17">├── partitura.py <text:s text:c="11"/># Partitura matplotlib (standalone)</text:span></text:p>
      <text:p text:style-name="P17"><text:span text:style-name="T17">├── export_tsv.lisp <text:s text:c="8"/># Estrazione corpus ConTimbre via SBCL</text:span></text:p>
      <text:p text:style-name="P17"><text:span text:style-name="T17">├── remnant_sc.scd <text:s text:c="9"/># SuperCollider — synth + OSC + spatializer</text:span></text:p>
      <text:p text:style-name="P17"><text:span text:style-name="T17">├── remnant_flucos.scd <text:s text:c="5"/># SuperCollider — analisi FluCoMa</text:span></text:p>
      <text:p text:style-name="P17"><text:span text:style-name="T17">├── remnant_guida.docx <text:s text:c="5"/># Questa guida</text:span></text:p>
      <text:p text:style-name="P17"><text:span text:style-name="T17">└── scores/</text:span></text:p>
      <text:p text:style-name="P17"><text:span text:style-name="T17"><text:s text:c="4"/>├── umap_full_coords.csv</text:span></text:p>
      <text:p text:style-name="P17"><text:span text:style-name="T17"><text:s text:c="4"/>├── *.json <text:s text:c="14"/># Partiture salvate</text:span></text:p>
      <text:p text:style-name="P17"><text:span text:style-name="T17"><text:s text:c="4"/>└── envelopes/</text:span></text:p>
      <text:p text:style-name="P17"><text:span text:style-name="T17"><text:s text:c="8"/>└── gesto_NN.svg</text:span></text:p>
      <text:p text:style-name="P12"/>
      <text:p text:style-name="P21"><text:span text:style-name="T10">Remnant · ConTimbre Live System · v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111111" fo:font-size="11pt" fo:language="it" fo:country="IT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111111" style:font-name="Arial" fo:font-size="11pt" fo:language="it" fo:country="IT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default-outline-level="" style:list-style-name="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706cm" fo:margin-bottom="0.282cm"/>
      <style:text-properties fo:color="#1f3b6b" style:font-name="Arial1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529cm" fo:margin-bottom="0.212cm"/>
      <style:text-properties fo:color="#2e7d99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353cm" fo:margin-bottom="0.141cm"/>
      <style:text-properties fo:color="#444444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color="#2e74b5" fo:font-style="italic" style:font-style-asian="italic" style:font-style-complex="italic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color="#2e74b5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fo:color="#1f4d78"/>
    </style:style>
    <style:style style:name="Strong_20_Emphasis" style:display-name="Strong Emphasis" style:family="paragraph" style:default-outline-level="" style:list-style-name="">
      <style:text-properties fo:font-weight="bold" style:font-weight-asian="bold" style:font-weight-complex="bold"/>
    </style:style>
    <style:style style:name="List_20_Paragraph" style:display-name="List Paragraph" style:family="paragraph" style:default-outline-level="" style:list-style-name=""/>
    <style:style style:name="footnote_20_text" style:display-name="footnote text" style:family="paragraph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endnote_20_text" style:display-name="endnote text" style:family="paragraph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ternet_20_link" style:display-name="Internet link" style:family="tex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reference" style:display-name="footnote reference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reference" style:display-name="end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176cm" fo:padding="0cm" fo:border-left="none" fo:border-right="none" fo:border-top="none" fo:border-bottom="0.018cm solid #dddddd"/>
    </style:style>
    <style:style style:name="MP2" style:family="paragraph" style:parent-style-name="Standard">
      <style:paragraph-properties fo:margin-top="0.141cm" fo:margin-bottom="0cm" fo:padding="0cm" fo:border-left="none" fo:border-right="none" fo:border-top="0.018cm solid #dddddd" fo:border-bottom="none"/>
    </style:style>
    <style:style style:name="MT1" style:family="text">
      <style:text-properties fo:color="#888888" style:font-name="Arial" fo:font-size="8pt" style:font-name-asian="Arial2" style:font-size-asian="8pt" style:font-name-complex="Arial2" style:font-size-complex="8pt"/>
    </style:style>
    <style:page-layout style:name="Mpm1">
      <style:page-layout-properties fo:page-width="21.001cm" fo:page-height="29.7cm" style:num-format="1" style:print-orientation="portrait" fo:margin-top="3.175cm" fo:margin-bottom="2.54cm" fo:margin-left="2.54cm" fo:margin-right="2.54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REMNANT <text:s/>· <text:s/>Guida di sistema v3</text:span></text:p>
      </style:header>
      <style:footer>
        <text:p text:style-name="MP2"><text:span text:style-name="MT1">ConTimbre Live System 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n-named</meta:initial-creator>
    <dc:creator>ivan pisino</dc:creator>
    <meta:editing-cycles>1</meta:editing-cycles>
    <meta:creation-date>2026-05-25T12:44:03.200</meta:creation-date>
    <dc:date>2026-05-27T11:57:18</dc:date>
    <meta:document-statistic meta:table-count="7" meta:image-count="0" meta:object-count="0" meta:page-count="8" meta:paragraph-count="236" meta:word-count="1725" meta:character-count="12349"/>
    <meta:generator>OpenOffice/4.1.16$Unix OpenOffice.org_project/4116m3$Build-9816</meta:generator>
  </office:meta>
</office:document-meta>
</file>